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lef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lef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lef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3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0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4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4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3" table:number-rows-repeated="1048510">
          <table:table-cell table:number-columns-repeated="16"/>
          <table:table-cell table:style-name="Default" table:number-columns-repeated="16368"/>
        </table:table-row>
        <table:table-row table:style-name="ro3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0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4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4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4"/>
          <table:table-cell table:style-name="Default" table:number-columns-repeated="16376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3" table:number-rows-repeated="1048475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1:02:40.913676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6-30T11:03:25.305797500</dc:date>
    <meta:editing-cycles>27</meta:editing-cycles>
    <meta:editing-duration>PT43M54S</meta:editing-duration>
    <meta:generator>LibreOffice/26.2.4.2$Windows_X86_64 LibreOffice_project/0229ac93fcf0d7cbc6376066c6f35021cef002dc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