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4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4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1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15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1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4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3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5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5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7:4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19:4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0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19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5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1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4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3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5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5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7:4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19:4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0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19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5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4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4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1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15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1" table:number-rows-repeated="37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</table:table-row>
        <table:table-row table:style-name="ro1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7">00/00/0000</text:date>, <text:time style:data-style-name="N2" text:time-value="17:11:25.65453766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7-17T17:12:21.814966075</dc:date>
    <meta:editing-cycles>33</meta:editing-cycles>
    <meta:editing-duration>PT49M55S</meta:editing-duration>
    <meta:generator>LibreOffice/24.2.7.2$Linux_X86_64 LibreOffice_project/420$Build-2</meta:generator>
    <meta:document-statistic meta:table-count="3" meta:cell-count="579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