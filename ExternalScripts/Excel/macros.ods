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2.50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9.618cm"/>
    </style:style>
    <style:style style:name="co18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1.91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191cm"/>
    </style:style>
    <style:style style:name="co9" style:family="table-column">
      <style:table-column-properties fo:break-before="auto" style:column-width="18.923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717cm"/>
    </style:style>
    <style:style style:name="co12" style:family="table-column">
      <style:table-column-properties fo:break-before="auto" style:column-width="3.367cm"/>
    </style:style>
    <style:style style:name="co13" style:family="table-column">
      <style:table-column-properties fo:break-before="auto" style:column-width="6.255cm"/>
    </style:style>
    <style:style style:name="co14" style:family="table-column">
      <style:table-column-properties fo:break-before="auto" style:column-width="14.734cm"/>
    </style:style>
    <style:style style:name="co19" style:family="table-column">
      <style:table-column-properties fo:break-before="auto" style:column-width="4.066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4.51cm"/>
    </style:style>
    <style:style style:name="co22" style:family="table-column">
      <style:table-column-properties fo:break-before="auto" style:column-width="7.334cm"/>
    </style:style>
    <style:style style:name="co23" style:family="table-column">
      <style:table-column-properties fo:break-before="auto" style:column-width="3.4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" style:family="paragraph">
      <loext:graphic-properties draw:fill="solid" draw:fill-color="#4f81bd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6" table:number-columns-repeated="10" table:default-cell-style-name="Default"/>
        <table:table-column table:style-name="co12" table:default-cell-style-name="ce3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3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2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1.029cm" table:end-y="0.206cm" draw:z-index="0" draw:name="Скругленный прямоугольник 1" draw:style-name="gr1" draw:text-style-name="P2" svg:width="2.305cm" svg:height="0.738cm" svg:x="0.635cm" svg:y="0.08cm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style-name="ce44"/>
          <table:table-cell table:style-name="ce46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9" office:value-type="string" calcext:value-type="string">
            <text:p>15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>
            <draw:custom-shape table:end-cell-address="Лист1.H7" table:end-x="1.638cm" table:end-y="0.486cm" draw:z-index="1" draw:name="Скругленный прямоугольник 2" draw:style-name="gr1" draw:text-style-name="P2" svg:width="2.755cm" svg:height="1.003cm" svg:x="0.794cm" svg:y="0.095cm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46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2:1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3"/>
          <table:table-cell table:style-name="ce44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43"/>
          <table:table-cell table:style-name="ce44"/>
          <table:table-cell table:number-columns-repeated="3"/>
          <table:table-cell table:style-name="ce44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43"/>
          <table:table-cell table:style-name="ce8"/>
          <table:table-cell table:number-columns-repeated="2"/>
          <table:table-cell table:style-name="ce45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5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43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9" office:value-type="string" calcext:value-type="string">
            <text:p>11:15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 table:style-name="ce45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5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00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1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45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5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3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42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9" office:value-type="string" calcext:value-type="string">
            <text:p>11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55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3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3"/>
          <table:table-cell table:style-name="ce42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9" office:value-type="string" calcext:value-type="string">
            <text:p>10:45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3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8:35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2"/>
          <table:table-cell table:style-name="ce3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43"/>
          <table:table-cell table:style-name="ce44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4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3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5:10</text:p>
          </table:table-cell>
          <table:table-cell table:style-name="ce43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7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9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43"/>
          <table:table-cell table:style-name="ce44"/>
          <table:table-cell table:style-name="ce42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42"/>
          <table:table-cell table:style-name="ce8"/>
          <table:table-cell table:style-name="ce42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42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3:30</text:p>
          </table:table-cell>
          <table:table-cell table:style-name="ce43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5:2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7:3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9:45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43"/>
          <table:table-cell table:style-name="ce44"/>
          <table:table-cell table:style-name="ce42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42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3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5:10</text:p>
          </table:table-cell>
          <table:table-cell table:style-name="ce43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7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9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21:3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43"/>
          <table:table-cell table:style-name="ce44"/>
          <table:table-cell table:style-name="ce42"/>
          <table:table-cell table:number-columns-repeated="16379"/>
        </table:table-row>
        <table:table-row table:style-name="ro2">
          <table:table-cell table:style-name="ce5"/>
          <table:table-cell/>
          <table:table-cell table:style-name="ce43"/>
          <table:table-cell table:style-name="ce44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4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31"/>
        <table:table-column table:style-name="co14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9" office:value-type="string" calcext:value-type="string">
            <text:p>10:45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3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8:35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43"/>
          <table:table-cell table:style-name="ce44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4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3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5:10</text:p>
          </table:table-cell>
          <table:table-cell table:style-name="ce43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7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9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43"/>
          <table:table-cell table:style-name="ce44"/>
          <table:table-cell table:style-name="ce42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42"/>
          <table:table-cell table:style-name="ce8"/>
          <table:table-cell table:style-name="ce42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42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3:30</text:p>
          </table:table-cell>
          <table:table-cell table:style-name="ce43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5:2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7:3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9:45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43"/>
          <table:table-cell table:style-name="ce44"/>
          <table:table-cell table:style-name="ce42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42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3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5:10</text:p>
          </table:table-cell>
          <table:table-cell table:style-name="ce43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7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9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21:3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9" office:value-type="string" calcext:value-type="string">
            <text:p>15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2:1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43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9" office:value-type="string" calcext:value-type="string">
            <text:p>11:15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00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1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3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42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9" office:value-type="string" calcext:value-type="string">
            <text:p>11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10</text:p>
          </table:table-cell>
          <table:table-cell table:style-name="ce43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55</text:p>
          </table:table-cell>
          <table:table-cell table:style-name="ce43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43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43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3"/>
          <table:table-cell table:style-name="ce44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3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3"/>
          <table:table-cell table:style-name="ce42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7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0:0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2:1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4:3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6:4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8:5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42" office:value-type="string" calcext:value-type="string">
            <text:p>Остров фантазий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23:3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8"/>
          <table:table-cell table:number-columns-repeated="3"/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39" office:value-type="string" calcext:value-type="string">
            <text:p>10:0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20" calcext:value-type="float">
            <text:p>220</text:p>
          </table:table-cell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39" office:value-type="string" calcext:value-type="string">
            <text:p>12:1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60" calcext:value-type="float">
            <text:p>260</text:p>
          </table:table-cell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39" office:value-type="string" calcext:value-type="string">
            <text:p>14:3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00" calcext:value-type="float">
            <text:p>300</text:p>
          </table:table-cell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39" office:value-type="string" calcext:value-type="string">
            <text:p>16:4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39" office:value-type="string" calcext:value-type="string">
            <text:p>18:5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42" office:value-type="string" calcext:value-type="string">
            <text:p>Остров фантазий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table:style-name="ce46" office:value-type="string" calcext:value-type="string">
            <text:p>day1</text:p>
          </table:table-cell>
          <table:table-cell table:style-name="ce39" office:value-type="string" calcext:value-type="string">
            <text:p>23:3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8"/>
          <table:table-cell table:number-columns-repeated="3"/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39" office:value-type="string" calcext:value-type="string">
            <text:p>10:0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20" calcext:value-type="float">
            <text:p>220</text:p>
          </table:table-cell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39" office:value-type="string" calcext:value-type="string">
            <text:p>12:1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60" calcext:value-type="float">
            <text:p>260</text:p>
          </table:table-cell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39" office:value-type="string" calcext:value-type="string">
            <text:p>14:3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00" calcext:value-type="float">
            <text:p>300</text:p>
          </table:table-cell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39" office:value-type="string" calcext:value-type="string">
            <text:p>16:4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39" office:value-type="string" calcext:value-type="string">
            <text:p>18:5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42" office:value-type="string" calcext:value-type="string">
            <text:p>Остров фантазий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table:style-name="ce46" office:value-type="string" calcext:value-type="string">
            <text:p>day2</text:p>
          </table:table-cell>
          <table:table-cell table:style-name="ce39" office:value-type="string" calcext:value-type="string">
            <text:p>23:3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8"/>
          <table:table-cell table:number-columns-repeated="3"/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39" office:value-type="string" calcext:value-type="string">
            <text:p>10:0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20" calcext:value-type="float">
            <text:p>220</text:p>
          </table:table-cell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39" office:value-type="string" calcext:value-type="string">
            <text:p>12:1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60" calcext:value-type="float">
            <text:p>260</text:p>
          </table:table-cell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39" office:value-type="string" calcext:value-type="string">
            <text:p>14:3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00" calcext:value-type="float">
            <text:p>300</text:p>
          </table:table-cell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39" office:value-type="string" calcext:value-type="string">
            <text:p>16:4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39" office:value-type="string" calcext:value-type="string">
            <text:p>18:5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42" office:value-type="string" calcext:value-type="string">
            <text:p>Остров фантазий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table:style-name="ce46" office:value-type="string" calcext:value-type="string">
            <text:p>day3</text:p>
          </table:table-cell>
          <table:table-cell table:style-name="ce39" office:value-type="string" calcext:value-type="string">
            <text:p>23:3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0:3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2:3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4:4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6:4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8:50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21:05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23:20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43"/>
          <table:table-cell table:style-name="ce44"/>
        </table:table-row>
        <table:table-row table:style-name="ro2">
          <table:table-cell table:style-name="ce48"/>
          <table:table-cell/>
          <table:table-cell table:style-name="ce43"/>
          <table:table-cell table:style-name="ce44"/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0:4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2:4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5:0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7:0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9:1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21:2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42" office:value-type="string" calcext:value-type="string">
            <text:p>Остров фантазий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43"/>
          <table:table-cell table:style-name="ce51"/>
        </table:table-row>
        <table:table-row table:style-name="ro2">
          <table:table-cell table:style-name="ce48"/>
          <table:table-cell/>
          <table:table-cell table:style-name="ce43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0:00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2:1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4:3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6:45</text:p>
          </table:table-cell>
          <table:table-cell table:style-name="ce43" office:value-type="string" calcext:value-type="string">
            <text:p>Вперёд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8:5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42" office:value-type="string" calcext:value-type="string">
            <text:p>Остров фантазий <text:s/>2D</text:p>
          </table:table-cell>
          <table:table-cell table:style-name="ce44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23:35</text:p>
          </table:table-cell>
          <table:table-cell table:style-name="ce43" office:value-type="string" calcext:value-type="string">
            <text:p>Отель «Белград» <text:s/>2D</text:p>
          </table:table-cell>
          <table:table-cell table:style-name="ce44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43"/>
          <table:table-cell table:style-name="ce44"/>
        </table:table-row>
        <table:table-row table:style-name="ro2">
          <table:table-cell table:style-name="ce48"/>
          <table:table-cell/>
          <table:table-cell table:style-name="ce43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43"/>
          <table:table-cell table:style-name="ce44"/>
        </table:table-row>
        <table:table-row table:style-name="ro2" table:number-rows-repeated="6">
          <table:table-cell/>
          <table:table-cell table:style-name="ce39"/>
          <table:table-cell table:style-name="ce43"/>
          <table:table-cell table:style-name="ce44"/>
        </table:table-row>
        <table:table-row table:style-name="ro2">
          <table:table-cell table:style-name="ce48"/>
          <table:table-cell table:style-name="ce49"/>
          <table:table-cell table:style-name="ce42"/>
          <table:table-cell table:style-name="ce44"/>
        </table:table-row>
        <table:table-row table:style-name="ro2" table:number-rows-repeated="2">
          <table:table-cell table:number-columns-repeated="2"/>
          <table:table-cell table:style-name="ce43"/>
          <table:table-cell table:style-name="ce51"/>
        </table:table-row>
        <table:table-row table:style-name="ro2" table:number-rows-repeated="5">
          <table:table-cell/>
          <table:table-cell table:style-name="ce39"/>
          <table:table-cell table:style-name="ce43"/>
          <table:table-cell table:style-name="ce44"/>
        </table:table-row>
        <table:table-row table:style-name="ro2">
          <table:table-cell/>
          <table:table-cell table:style-name="ce49"/>
          <table:table-cell table:style-name="ce42"/>
          <table:table-cell table:style-name="ce44"/>
        </table:table-row>
        <table:table-row table:style-name="ro2">
          <table:table-cell table:style-name="ce48"/>
          <table:table-cell table:style-name="ce39"/>
          <table:table-cell table:style-name="ce43"/>
          <table:table-cell table:style-name="ce44"/>
        </table:table-row>
        <table:table-row table:style-name="ro1">
          <table:table-cell table:number-columns-repeated="2"/>
          <table:table-cell table:style-name="ce43"/>
          <table:table-cell table:style-name="ce44"/>
        </table:table-row>
        <table:table-row table:style-name="ro2">
          <table:table-cell table:number-columns-repeated="2"/>
          <table:table-cell table:style-name="ce43"/>
          <table:table-cell table:style-name="ce51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10:51:07.49195442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4-28T10:52:37.000363195</dc:date>
    <meta:editing-cycles>5</meta:editing-cycles>
    <meta:editing-duration>PT11M40S</meta:editing-duration>
    <meta:generator>LibreOffice/24.2.7.2$Linux_X86_64 LibreOffice_project/420$Build-2</meta:generator>
    <meta:document-statistic meta:table-count="3" meta:cell-count="515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